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4.059cm"/>
    </style:style>
    <style:style style:name="Table1.B" style:family="table-column">
      <style:table-column-properties style:column-width="6.696cm"/>
    </style:style>
    <style:style style:name="Table1.C" style:family="table-column">
      <style:table-column-properties style:column-width="6.246cm"/>
    </style:style>
    <style:style style:name="Table1.A1" style:family="table-cell">
      <style:table-cell-properties style:vertical-align="middle" fo:padding="0.049cm" fo:border="0.05pt solid #000000"/>
    </style:style>
    <style:style style:name="Table2" style:family="table">
      <style:table-properties style:width="17cm" table:align="left"/>
    </style:style>
    <style:style style:name="Table2.A" style:family="table-column">
      <style:table-column-properties style:column-width="3.925cm"/>
    </style:style>
    <style:style style:name="Table2.B" style:family="table-column">
      <style:table-column-properties style:column-width="6.084cm"/>
    </style:style>
    <style:style style:name="Table2.C" style:family="table-column">
      <style:table-column-properties style:column-width="6.992cm"/>
    </style:style>
    <style:style style:name="Table2.A1" style:family="table-cell">
      <style:table-cell-properties style:vertical-align="middle" fo:padding="0.049cm" fo:border="0.05pt solid #000000"/>
    </style:style>
    <style:style style:name="Table3" style:family="table">
      <style:table-properties style:width="17cm" table:align="left"/>
    </style:style>
    <style:style style:name="Table3.A" style:family="table-column">
      <style:table-column-properties style:column-width="2.778cm"/>
    </style:style>
    <style:style style:name="Table3.B" style:family="table-column">
      <style:table-column-properties style:column-width="5.821cm"/>
    </style:style>
    <style:style style:name="Table3.C" style:family="table-column">
      <style:table-column-properties style:column-width="3.468cm"/>
    </style:style>
    <style:style style:name="Table3.D" style:family="table-column">
      <style:table-column-properties style:column-width="4.934cm"/>
    </style:style>
    <style:style style:name="Table3.A1" style:family="table-cell">
      <style:table-cell-properties style:vertical-align="middle" fo:padding="0.049cm" fo:border="0.05pt solid #000000"/>
    </style:style>
    <style:style style:name="P1" style:family="paragraph" style:parent-style-name="Heading_20_1">
      <style:paragraph-properties fo:margin-left="0cm" fo:margin-right="0cm" fo:text-indent="0cm" style:auto-text-indent="false"/>
      <style:text-properties fo:font-variant="normal" fo:text-transform="none" fo:color="#000000" loext:opacity="100%" fo:letter-spacing="normal" fo:font-style="normal" fo:font-weight="normal"/>
    </style:style>
    <style:style style:name="P2" style:family="paragraph" style:parent-style-name="Heading_20_2">
      <style:paragraph-properties fo:margin-left="0cm" fo:margin-right="0cm" fo:text-indent="0cm" style:auto-text-indent="false"/>
      <style:text-properties fo:font-variant="normal" fo:text-transform="none" fo:color="#000000" loext:opacity="100%" fo:letter-spacing="normal" fo:font-style="normal" fo:font-weight="normal"/>
    </style:style>
    <style:style style:name="P3" style:family="paragraph" style:parent-style-name="Text_20_body">
      <style:paragraph-properties fo:margin-left="0cm" fo:margin-right="0cm" fo:margin-top="0cm" fo:margin-bottom="0.247cm" style:contextual-spacing="false" fo:line-height="114%" fo:text-indent="0cm" style:auto-text-indent="false"/>
      <style:text-properties fo:font-variant="normal" fo:text-transform="none" fo:color="#000000" loext:opacity="100%" fo:letter-spacing="normal" fo:font-style="normal" fo:font-weight="normal"/>
    </style:style>
    <style:style style:name="P4" style:family="paragraph" style:parent-style-name="Table_20_Contents">
      <style:paragraph-properties fo:margin-left="0cm" fo:margin-right="0cm" fo:margin-top="0cm" fo:margin-bottom="0cm" style:contextual-spacing="false" fo:line-height="114%" fo:text-indent="0cm" style:auto-text-indent="false"/>
    </style:style>
    <style:style style:name="P5"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fo:font-weight="bold"/>
    </style:style>
    <style:style style:name="P6"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style:style>
    <style:style style:name="P7" style:family="paragraph" style:parent-style-name="Heading_20_3">
      <style:paragraph-properties fo:margin-left="0cm" fo:margin-right="0cm" fo:text-indent="0cm" style:auto-text-indent="false"/>
      <style:text-properties fo:font-variant="normal" fo:text-transform="none" fo:color="#000000" loext:opacity="100%" fo:letter-spacing="normal" fo:font-style="normal" fo:font-weight="normal"/>
    </style:style>
    <style:style style:name="P8" style:family="paragraph" style:parent-style-name="Text_20_body">
      <style:paragraph-properties fo:margin-left="0cm" fo:margin-right="0cm" fo:text-indent="0cm" style:auto-text-indent="false"/>
      <style:text-properties fo:font-variant="normal" fo:text-transform="none" fo:color="#000000" loext:opacity="100%" fo:letter-spacing="normal" fo:font-style="normal" fo:font-weight="normal"/>
    </style:style>
    <style:style style:name="P9" style:family="paragraph" style:parent-style-name="Text_20_body" style:list-style-name="L1">
      <style:paragraph-properties fo:margin-left="0cm" fo:margin-right="0cm" fo:margin-top="0cm" fo:margin-bottom="0.247cm" style:contextual-spacing="false" fo:line-height="114%" fo:text-indent="0cm" style:auto-text-indent="false"/>
      <style:text-properties fo:font-variant="normal" fo:text-transform="none" fo:color="#000000" loext:opacity="100%" style:font-name="Google Sans Text" fo:letter-spacing="normal" fo:font-style="normal" fo:font-weight="normal"/>
    </style:style>
    <style:style style:name="P10" style:family="paragraph" style:parent-style-name="Text_20_body" style:list-style-name="L2">
      <style:paragraph-properties fo:margin-left="0cm" fo:margin-right="0cm" fo:margin-top="0cm" fo:margin-bottom="0.247cm" style:contextual-spacing="false" fo:line-height="114%" fo:text-indent="0cm" style:auto-text-indent="false"/>
      <style:text-properties fo:font-variant="normal" fo:text-transform="none" fo:color="#000000" loext:opacity="100%" style:font-name="Google Sans Text" fo:letter-spacing="normal" fo:font-style="normal" fo:font-weight="normal"/>
    </style:style>
    <style:style style:name="P11" style:family="paragraph" style:parent-style-name="Text_20_body">
      <style:paragraph-properties fo:margin-left="0cm" fo:margin-right="0cm" fo:margin-top="0cm" fo:margin-bottom="0.247cm" style:contextual-spacing="false" fo:line-height="114%" fo:text-indent="0cm" style:auto-text-indent="false"/>
      <style:text-properties fo:font-variant="normal" fo:text-transform="none" fo:color="#000000" loext:opacity="100%" style:font-name="Google Sans Text" fo:letter-spacing="normal" fo:font-style="normal" fo:font-weight="normal"/>
    </style:style>
    <style:style style:name="T1" style:family="text">
      <style:text-properties style:font-name="Google Sans Text"/>
    </style:style>
    <style:style style:name="T2" style:family="text">
      <style:text-properties style:font-name="Google Sans Text" fo:font-style="italic"/>
    </style:style>
    <style:style style:name="T3" style:family="text">
      <style:text-properties style:font-name="Google Sans Text" style:font-name-asian="Google Sans Text" style:font-name-complex="Google Sans Text"/>
    </style:style>
    <style:style style:name="T4" style:family="text">
      <style:text-properties fo:font-weight="bol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Neurocognitive Frameworks and Strategic Interventions for ADHD Planning: A Comprehensive Analysis of Medicated and Unmedicated Profiles</text:h>
      <text:h text:style-name="P2" text:outline-level="2">Introduction to Executive Dysfunction and the Paradigm Shift in ADHD Management</text:h>
      <text:p text:style-name="P3"><text:bookmark text:name="p-c_93a4b892acd15d1a_dbaeb244-7a8d-4aa8-9378-2a4606980430-19"/><text:span text:style-name="T1">Attention-Deficit/Hyperactivity Disorder (ADHD) is a profound neurodevelopmental condition defined by pervasive, persistent patterns of inattention, hyperactivity, and impulsivity that fundamentally disrupt both cognitive functioning and psychosocial development.</text:span> <text:span text:style-name="T1">Historically, the medical consensus conceptualized ADHD as a transient childhood behavioral disorder, operating under the assumption that neurodevelopmental maturation would naturally resolve the symptoms by puberty.</text:span> <text:span text:style-name="T1">However, robust longitudinal research over the past three decades has precipitated a radical paradigm shift. Epidemiological data now confirm that impairing ADHD symptoms persist into adulthood for more than sixty percent of diagnosed individuals.</text:span> <text:span text:style-name="T1">In the adult population, the disorder manifests less as overt physical hyperactivity and more as severe, systemic deficits in executive functioning (EF)—the high-level, prefrontal cognitive processes required to plan, focus, organize, manage time, and regulate emotional responses.</text:span></text:p>
      <text:p text:style-name="P3"><text:bookmark text:name="p-c_93a4b892acd15d1a_dbaeb244-7a8d-4aa8-9378-2a4606980430-20"/><text:span text:style-name="T1">Currently, the Centers for Disease Control and Prevention estimates that ADHD affects approximately 4.4% to 6% of adults in the United States, translating to between 10.5 million and 15.5 million individuals.</text:span> <text:span text:style-name="T1">The average age of diagnosis for adult ADHD has risen to approximately 28 years, indicating a vast demographic of individuals who have navigated the complexities of education and early career development without a pharmacological or structural safety net.</text:span> <text:span text:style-name="T1">These individuals consistently score 10 to 15 points lower on standardized measures of executive functioning, such as the Behavior Rating Inventory of Executive Function (BRIEF2A), compared to their neurotypical peers.</text:span></text:p>
      <text:p text:style-name="P3"><text:bookmark text:name="p-c_93a4b892acd15d1a_dbaeb244-7a8d-4aa8-9378-2a4606980430-21"/><text:span text:style-name="T1">The implications of this executive dysfunction on the capacity to plan and execute daily tasks are profound and multi-faceted. Individuals with impaired executive function frequently experience "time blindness," defined as an inherent inability to accurately perceive the passage of time or estimate the duration required to complete sequential tasks.</text:span> <text:span text:style-name="T1">Furthermore, working memory deficits and severe procrastination lead to significant operational failures in daily life.</text:span> <text:span text:style-name="T1">In practical terms, this translates to highly disorganized object management, the repeated purchasing of identical items, mental paralysis in the face of complex or multi-step tasks, and an overarching inability to maintain goal-directed behavior over extended periods.</text:span> <text:span text:style-name="T1">Traditional assessment methodologies have often failed these individuals by evaluating ADHD symptoms or executive function deficits in isolation, yielding a fragmented and incomplete understanding of the specific cognitive bottlenecks an individual faces when attempting to plan.</text:span></text:p>
      <text:p text:style-name="P3"><text:bookmark text:name="p-c_93a4b892acd15d1a_dbaeb244-7a8d-4aa8-9378-2a4606980430-22"/><text:soft-page-break/><text:span text:style-name="T1">Modern neurocognitive frameworks, however, increasingly view ADHD-related planning failures not as an inherent lack of discipline, willpower, or knowledge, but rather as a fundamental neurological mismatch between an individual's internal cognitive infrastructure and external environmental demands.</text:span> <text:span text:style-name="T1">To effectively design, implement, and sustain planning frameworks for individuals with ADHD, it is imperative for clinicians, coaches, and patients to distinguish between the neurobiological state of the medicated brain and the unmedicated brain. Planning strategies that rely on intrinsic motivation, delayed gratification, or sustained voluntary attention may succeed brilliantly during the peak efficacy window of pharmacological interventions, but they will invariably collapse during unmedicated periods, medication holidays, or evening rebound phases. Consequently, a nuanced, evidence-based approach to ADHD planning must dynamically adapt to the individual's fluctuating dopaminergic states. This requires the utilization of a sophisticated combination of pharmacological optimization, precise behavioral activation techniques, chronobiological scheduling, and externalized structural scaffolding.</text:span></text:p>
      <text:h text:style-name="P2" text:outline-level="2">The Neurobiology of Intention and Execution: Redefining the Mechanisms of Action</text:h>
      <text:p text:style-name="P3"><text:bookmark text:name="p-c_93a4b892acd15d1a_dbaeb244-7a8d-4aa8-9378-2a4606980430-23"/><text:span text:style-name="T1">To design effective planning routines, one must first understand the neurobiological parameters that govern task initiation and sustained focus in the ADHD brain. Recent neuroimaging and pharmacological research has catalyzed a fundamental paradigm shift in the scientific understanding of how ADHD medications facilitate planning and task execution. For decades, the prevailing clinical consensus posited that prescription stimulant medications—such as methylphenidate (Ritalin) and dexamphetamine (Adderall)—functioned by directly acting upon the brain's specialized attention circuitry.</text:span> <text:span text:style-name="T1">It was widely taught that these drugs provided individuals with increased voluntary, top-down control over their attentional focus.</text:span></text:p>
      <text:p text:style-name="P3"><text:bookmark text:name="p-c_93a4b892acd15d1a_dbaeb244-7a8d-4aa8-9378-2a4606980430-24"/><text:span text:style-name="T1">However, breakthrough research published in </text:span><text:span text:style-name="T2">Cell</text:span><text:span text:style-name="T1"> in late 2025 by investigators at the Washington University School of Medicine fundamentally altered this theoretical model. Utilizing advanced functional magnetic resonance imaging (fMRI) data collected between 2016 and 2019 from the National Institutes of Health's Adolescent Brain Cognitive Development (ABCD) study, researchers analyzed the neural architecture of nearly 5,800 pediatric subjects.</text:span> <text:span text:style-name="T1">Within this cohort, 337 children (73% of whom were male, and 76% of whom met the diagnostic criteria for ADHD) took a stimulant medication on the morning of their scans.</text:span> <text:span text:style-name="T1">The research team sought to identify stimulant-related changes in synchronized neural activity within and between various brain neuron networks.</text:span></text:p>
      <text:p text:style-name="P3"><text:bookmark text:name="p-c_93a4b892acd15d1a_dbaeb244-7a8d-4aa8-9378-2a4606980430-25"/><text:span text:style-name="T1">The findings demonstrated unequivocally that prescription stimulants do not primarily affect the brain's attention-controlling regions as previously thought.</text:span> <text:span text:style-name="T1">Instead, the brain scans revealed that the drugs act predominantly on the neural networks governing wakefulness and reward.</text:span> <text:span text:style-name="T1">This revelation profoundly alters the understanding of medicated planning: the improved attention observed in medicated individuals is a secondary, downstream effect. The medication enhances cognitive performance by artificially making the individual hyper-alert and causing mundane tasks to register as intrinsically salient and rewarding, thereby naturally lowering the pathological threshold for task initiation.</text:span> <text:span text:style-name="T1">Furthermore, the functional MRI data showed that stimulant medications produce </text:span><text:soft-page-break/><text:span text:style-name="T1">patterns of synchronized brain activity that closely mimic the restorative neurobiological effects of adequate sleep, effectively overriding the neural signatures of sleep deprivation.</text:span></text:p>
      <text:p text:style-name="P3"><text:bookmark text:name="p-c_93a4b892acd15d1a_dbaeb244-7a8d-4aa8-9378-2a4606980430-26"/><text:span text:style-name="T1">This neurobiological dichotomy between the medicated and unmedicated state is further evidenced by comprehensive structural and functional connectivity studies. During cognitively demanding tasks that require executive oversight, the medicated ADHD brain exhibits robust, increased activation in key executive areas. This includes the prefrontal cortex, the anterior cingulate cortex (ACC) which manages attentional control, and parietal regions responsible for the seamless shifting of tasks.</text:span> <text:span text:style-name="T1">Conversely, the unmedicated ADHD brain demonstrates a generalized, pervasive hypoactivation across these networks.</text:span> <text:span text:style-name="T1">This lack of activation is particularly acute during tasks that require the rapid shifting of cognitive sets or the inhibition of prepotent, impulsive responses, where the unmedicated brain simply fails to recruit the necessary metabolic resources.</text:span></text:p>
      <text:p text:style-name="P3"><text:bookmark text:name="p-c_93a4b892acd15d1a_dbaeb244-7a8d-4aa8-9378-2a4606980430-27"/><text:span text:style-name="T1">The long-term impact of medication on the physical structure of the brain has also been a subject of intense longitudinal research. Studies utilizing the "Brain-Age Gap" (BAG) metric—the quantifiable variance between an individual's predicted biological brain age and their actual chronological age—reveal that morphological abnormalities and atypical neurodevelopmental trajectories are contingent on medication status.</text:span> <text:span text:style-name="T1">In a large multi-site cohort analyzing structural MRI data of 947 individuals aged 7 to 26 years, researchers found that BAG abnormalities were predominantly observed in unmedicated individuals.</text:span> <text:span text:style-name="T1">Specifically, unmedicated children with ADHD exhibited a pronounced divergence in brain maturation, particularly in white matter volumes, which make up approximately 50% of total brain tissue.</text:span> <text:span text:style-name="T1">Medicated individuals, however, exhibited neural structures and developmental trajectories that were significantly closer to those of matched, typically developing neurotypical controls.</text:span></text:p>
      <text:section text:style-name="Sect1" text:name="p-c_93a4b892acd15d1a_dbaeb244-7a8d-4aa8-9378-2a4606980430-28">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4"><text:span text:style-name="Strong_20_Emphasis"><text:span text:style-name="T1">Neurobiological Metric</text:span></text:span></text:p>
              </table:table-cell>
              <table:table-cell table:style-name="Table1.A1" office:value-type="string">
                <text:p text:style-name="P4"><text:span text:style-name="Strong_20_Emphasis"><text:span text:style-name="T1">Unmedicated ADHD Profile</text:span></text:span></text:p>
              </table:table-cell>
              <table:table-cell table:style-name="Table1.A1" office:value-type="string">
                <text:p text:style-name="P4"><text:span text:style-name="Strong_20_Emphasis"><text:span text:style-name="T1">Medicated ADHD Profile</text:span></text:span></text:p>
              </table:table-cell>
            </table:table-row>
          </table:table-header-rows>
          <table:table-row>
            <table:table-cell table:style-name="Table1.A1" office:value-type="string">
              <text:p text:style-name="P5">Neural Network Activation</text:p>
            </table:table-cell>
            <table:table-cell table:style-name="Table1.A1" office:value-type="string">
              <text:p text:style-name="P6">Generalized hypoactivation in prefrontal, anterior cingulate, and parietal regions during executive tasks.<text:span text:style-name="T3"/></text:p>
            </table:table-cell>
            <table:table-cell table:style-name="Table1.A1" office:value-type="string">
              <text:p text:style-name="P6">Increased, synchronized activation in reward and wakefulness networks; mimics patterns of restorative sleep.<text:span text:style-name="T3"/></text:p>
            </table:table-cell>
          </table:table-row>
          <table:table-row>
            <table:table-cell table:style-name="Table1.A1" office:value-type="string">
              <text:p text:style-name="P5">Task Perception and Salience</text:p>
            </table:table-cell>
            <table:table-cell table:style-name="Table1.A1" office:value-type="string">
              <text:p text:style-name="P6">Extremely high threshold for task initiation due to temporal discounting and low intrinsic reward salience.<text:span text:style-name="T3"/></text:p>
            </table:table-cell>
            <table:table-cell table:style-name="Table1.A1" office:value-type="string">
              <text:p text:style-name="P6">Tasks register as intrinsically salient and rewarding, eliminating the cognitive friction required to initiate planning.<text:span text:style-name="T3"/></text:p>
            </table:table-cell>
          </table:table-row>
          <table:table-row>
            <table:table-cell table:style-name="Table1.A1" office:value-type="string">
              <text:p text:style-name="P5">Brain-Age Gap (BAG) Trajectory</text:p>
            </table:table-cell>
            <table:table-cell table:style-name="Table1.A1" office:value-type="string">
              <text:p text:style-name="P6">Pronounced deviations in BAG, indicating atypical neurodevelopment, particularly in white matter volumes during childhood.<text:span text:style-name="T3"/></text:p>
            </table:table-cell>
            <table:table-cell table:style-name="Table1.A1" office:value-type="string">
              <text:p text:style-name="P6">Mitigation of BAG abnormalities; morphological phenotypes more closely align with neurotypical developmental baselines.<text:span text:style-name="T3"/></text:p>
            </table:table-cell>
          </table:table-row>
          <table:table-row>
            <table:table-cell table:style-name="Table1.A1" office:value-type="string">
              <text:p text:style-name="P5">Autonomic Nervous System Reactivity</text:p>
            </table:table-cell>
            <table:table-cell table:style-name="Table1.A1" office:value-type="string">
              <text:p text:style-name="P6">Attenuated skin conductance levels in response to errors; physiological signals fail to prompt <text:soft-page-break/>behavioral correction.<text:span text:style-name="T3"/></text:p>
            </table:table-cell>
            <table:table-cell table:style-name="Table1.A1" office:value-type="string">
              <text:p text:style-name="P6">Stabilized autonomic tone and altered reactivity patterns, though elevated baselines can <text:soft-page-break/>introduce pharmacokinetic variability.<text:span text:style-name="T3"/></text:p>
            </table:table-cell>
          </table:table-row>
          <table:table-row>
            <table:table-cell table:style-name="Table1.A1" office:value-type="string">
              <text:p text:style-name="P5">Impulsivity and Compulsivity Risk</text:p>
            </table:table-cell>
            <table:table-cell table:style-name="Table1.A1" office:value-type="string">
              <text:p text:style-name="P6">Heightened impulsivity; increased vulnerability to behavioral addictions (e.g., internet, excessive exercise) to regulate dopamine.<text:span text:style-name="T3"/></text:p>
            </table:table-cell>
            <table:table-cell table:style-name="Table1.A1" office:value-type="string">
              <text:p text:style-name="P6">Regulated dopaminergic tone reduces the neurochemical drive for immediate, exogenous stimulation or addictive behaviors.<text:span text:style-name="T3"/></text:p>
            </table:table-cell>
          </table:table-row>
        </table:table>
        <text:p text:style-name="Text_20_body"/>
      </text:section>
      <text:p text:style-name="P3"><text:bookmark text:name="p-c_93a4b892acd15d1a_dbaeb244-7a8d-4aa8-9378-2a4606980430-29"/><text:span text:style-name="T1">The physiological reality of the unmedicated state directly compromises long-term planning. Polygraph testing research, which measures autonomic reactivity, demonstrates that unmedicated individuals with ADHD exhibit marked decreases in skin conductance responses to errors relative to controls.</text:span> <text:span text:style-name="T1">Because their physiological response to making a mistake is muted, the unmedicated brain does not register errors as urgent, severely limiting the ability to learn from planning failures and adjust behavior.</text:span> <text:span text:style-name="T1">Furthermore, because the unmedicated ADHD brain exists in a chronic state of reward-deficiency, these individuals frequently turn to highly stimulating, immediate-feedback activities to artificially regulate their dopaminergic tone. Research indicates that unmedicated adults with ADHD exhibit significantly higher rates of both impulsivity and compulsivity, which are strongly correlated with behavioral addictions such as excessive internet use, problematic gambling, and exercise dependency.</text:span> <text:span text:style-name="T1">When designing planning frameworks, these neurobiological realities dictate a harsh truth: unmedicated planning cannot rely on the delayed gratification of long-term goals. It must artificially simulate the immediate reward and physiological urgency that the unmedicated brain fails to generate organically.</text:span></text:p>
      <text:h text:style-name="P2" text:outline-level="2">The Medicated Planning Paradigm: Optimizing Pharmacokinetics and Task Completion</text:h>
      <text:p text:style-name="P3"><text:bookmark text:name="p-c_93a4b892acd15d1a_dbaeb244-7a8d-4aa8-9378-2a4606980430-30"/><text:span text:style-name="T1">For individuals utilizing pharmacological interventions, the planning strategy undergoes a fundamental shift. Rather than expending massive amounts of cognitive energy attempting to generate baseline motivation, the focus shifts to optimizing the specific period of peak medication efficacy and rigorously managing the volatile pharmacological transition phases. Stimulants, while highly effective for approximately 80% of the patient population, are not a monolithic cure.</text:span> <text:span text:style-name="T1">They possess finite half-lives, distinct pharmacokinetic curves, and variable metabolic clearance rates that must be meticulously mapped onto the individual's daily schedule to ensure successful planning.</text:span></text:p>
      <text:h text:style-name="P7" text:outline-level="3">Prescription Dynamics and Initiation Trends</text:h>
      <text:p text:style-name="P3"><text:bookmark text:name="p-c_93a4b892acd15d1a_dbaeb244-7a8d-4aa8-9378-2a4606980430-31"/><text:span text:style-name="T1">The timing of when an individual begins medication heavily influences their academic and professional planning trajectories. Recent retrospective cohort studies analyzing the electronic medical records of primary care and developmental-behavioral pediatrics (DBP) clinics reveal striking trends in medication initiation.</text:span> <text:span text:style-name="T1">In a massive study of 9,708 children aged 3 to 5 years diagnosed with ADHD, researchers found that an astonishing 42.2% </text:span><text:soft-page-break/><text:span text:style-name="T1">were prescribed medications within a single month of their initial ADHD-related diagnosis.Even among preschoolers who did not initially meet the full diagnostic criteria for the condition, 22.9% received stimulant medication within 30 days.</text:span> <text:span text:style-name="T1">This rapid initiation often stems from a systemic lack of accessible behavioral therapy alternatives, forcing clinicians to rely on pharmacological management as a first-line defense to stabilize the child's environment.</text:span></text:p>
      <text:p text:style-name="P3"><text:bookmark text:name="p-c_93a4b892acd15d1a_dbaeb244-7a8d-4aa8-9378-2a4606980430-32"/><text:span text:style-name="T1">However, the initiation of medication is not uniform. Longer times to medication prescription are significantly associated with specific sociodemographic and clinical factors, including Asian race/ethnicity, the involvement of a psychologist rather than a primary care physician, and the presence of co-occurring conditions, most commonly anxiety.</text:span> <text:span text:style-name="T1">Conversely, shorter times to prescription correlate with older age and diagnoses of the combined or hyperactive/impulsive ADHD subtypes, where overt behavioral disruptions force immediate intervention.</text:span></text:p>
      <text:p text:style-name="P3"><text:bookmark text:name="p-c_93a4b892acd15d1a_dbaeb244-7a8d-4aa8-9378-2a4606980430-33"/><text:span text:style-name="T1">Once initiated, achieving the correct pharmacological balance is historically a process of attrition. On average, children try 2.75 different medications, and adults cycle through 2.56 prescriptions before finding a regimen that adequately reduces symptoms without intolerable side effects.</text:span> <text:span text:style-name="T1">To minimize this trial-and-error approach, modern clinics are increasingly adopting personalized medication response testing and objective assessment technologies.</text:span> <text:span text:style-name="T1">Tools such as the QbTest—a continuous performance test that tracks micro-movements and attention—allow clinicians to quantitatively measure symptom reduction and establish standardized models of care, thereby accelerating the patient's transition from medical stabilization to active life planning.</text:span></text:p>
      <text:h text:style-name="P7" text:outline-level="3">Shifting to a Task Completion Framework</text:h>
      <text:p text:style-name="P3"><text:bookmark text:name="p-c_93a4b892acd15d1a_dbaeb244-7a8d-4aa8-9378-2a4606980430-34"/><text:span text:style-name="T1">Once an optimal medication dosage is established, the framework for assessing the effectiveness of a patient's planning must evolve. Medical professionals face significant challenges when treating adults, as shifting the paradigm of treatment from mere symptom reduction to effectively increasing task completions is necessary.</text:span> <text:span text:style-name="T1">Rather than reviewing subjective changes in behavior scaled on a checklist, physicians and coaches are encouraged to evaluate the patient's objective report on the status of task incompletions.</text:span></text:p>
      <text:p text:style-name="P3"><text:bookmark text:name="p-c_93a4b892acd15d1a_dbaeb244-7a8d-4aa8-9378-2a4606980430-35"/><text:span text:style-name="T1">Medication provides the neurochemical alertness required to perform work, but it does not teach the patient what to work on. In academic settings, the presence of medication has been shown to modestly improve long-term persistence, with medicated students completing more semesters (54% persistence) compared to their unmedicated peers (49% persistence); however, both groups still lag significantly behind neurotypical baselines (59% persistence).</text:span> <text:span text:style-name="T1">Unmedicated ADHD students complete nearly one full semester less than non-ADHD students on average, and this gap in academic persistence appears early and persists throughout the four-year study period.</text:span> <text:span text:style-name="T1">This empirical reality proves that while medication provides the physiological foundation for planning, it must be paired with structured environmental strategies to translate focus into tangible academic or professional output.</text:span></text:p>
      <text:p text:style-name="P3"><text:bookmark text:name="p-c_93a4b892acd15d1a_dbaeb244-7a8d-4aa8-9378-2a4606980430-36"/><text:span text:style-name="T1">The core principle of planning on medication is chronobiological alignment. Because the medication artificially enhances wakefulness and task reward salience, individuals must deliberately schedule their most cognitively demanding, executive-function-heavy tasks </text:span><text:soft-page-break/><text:span text:style-name="T1">during the peak plasma concentration of the stimulant.</text:span> <text:span text:style-name="T1">This requires transforming the ADHD problem from a perspective of a mental health disorder existing "inside the skin" to a functional condition occurring "outside the skin," in the world of manageable action.</text:span> <text:span text:style-name="T1">Individuals are encouraged to form collaborative partnerships to enlist the assistance of others to improve work completion, an effective strategy defined in the literature as “social scaffolding”.</text:span></text:p>
      <text:h text:style-name="P7" text:outline-level="3">Navigating the Pharmacological Crash: Medication Rebound Strategies</text:h>
      <text:p text:style-name="P3"><text:bookmark text:name="p-c_93a4b892acd15d1a_dbaeb244-7a8d-4aa8-9378-2a4606980430-37"/><text:span text:style-name="T1">The most critical vulnerability in the medicated planning framework is the phenomenon known as "medication rebound," colloquially referred to by pediatricians and parents as the "arsenic hour" or the "witching hour".Stimulant drugs for ADHD act quickly, entering the bloodstream and taking effect anywhere from 30 to 90 minutes after ingestion.</text:span> <text:span text:style-name="T1">Depending on the specific formulation, these medicines can last between four and 16 hours before being filtered through the liver or kidneys and leaving the body.</text:span> <text:span text:style-name="T1">Ideally, ADHD medications should wear off evenly and gradually. However, due to individual metabolic differences, many patients process the drugs too quickly, causing a rapid, precipitous drop in blood serum medication levels.</text:span></text:p>
      <text:p text:style-name="P3"><text:bookmark text:name="p-c_93a4b892acd15d1a_dbaeb244-7a8d-4aa8-9378-2a4606980430-38"/><text:span text:style-name="T1">This sudden physiological clearance strips the brain of its artificial wakefulness and reward signaling, leading to an intense, transient resurgence of ADHD symptoms.</text:span> <text:span text:style-name="T1">It is vital to note that it is only classified as a "rebound" if the medication works well throughout the day and the severe symptoms emerge specifically toward the end of the day when the medication's therapeutic window closes.</text:span> <text:span text:style-name="T1">Symptoms of rebound include extreme hyperactivity, severe grumpiness and irritability, sudden crying or yelling without obvious provocation, and an overwhelming sense of frustration as the individual realizes they can no longer easily handle the cognitive load they were managing an hour prior.</text:span></text:p>
      <text:p text:style-name="P3"><text:bookmark text:name="p-c_93a4b892acd15d1a_dbaeb244-7a8d-4aa8-9378-2a4606980430-39"/><text:span text:style-name="T1">If the daily planning framework does not aggressively account for this rebound window, evening routines, homework completion, and interpersonal relationships can be severely destabilized.</text:span> <text:span text:style-name="T1">Strategic mitigation of medication rebound requires a sophisticated combination of precise scheduling adjustments and physiological interventions to smooth the neurological transition.</text:span></text:p>
      <text:section text:style-name="Sect1" text:name="p-c_93a4b892acd15d1a_dbaeb244-7a8d-4aa8-9378-2a4606980430-40">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text:span text:style-name="Strong_20_Emphasis"><text:span text:style-name="T1">Rebound Mitigation Strategy</text:span></text:span></text:p>
              </table:table-cell>
              <table:table-cell table:style-name="Table2.A1" office:value-type="string">
                <text:p text:style-name="P4"><text:span text:style-name="Strong_20_Emphasis"><text:span text:style-name="T1">Mechanistic Rationale</text:span></text:span></text:p>
              </table:table-cell>
              <table:table-cell table:style-name="Table2.A1" office:value-type="string">
                <text:p text:style-name="P4"><text:span text:style-name="Strong_20_Emphasis"><text:span text:style-name="T1">Implementation Tactic</text:span></text:span></text:p>
              </table:table-cell>
            </table:table-row>
          </table:table-header-rows>
          <table:table-row>
            <table:table-cell table:style-name="Table2.A1" office:value-type="string">
              <text:p text:style-name="P5">Flipping the Evening Schedule</text:p>
            </table:table-cell>
            <table:table-cell table:style-name="Table2.A1" office:value-type="string">
              <text:p text:style-name="P6">Prevents heavy cognitive demands from overlapping with the rapid depletion of dopamine and norepinephrine.<text:span text:style-name="T3"/></text:p>
            </table:table-cell>
            <table:table-cell table:style-name="Table2.A1" office:value-type="string">
              <text:p text:style-name="P6">Shift all demanding tasks (e.g., homework, complex household chores) to early in the evening, prioritizing them immediately after school/work while the medication remains effective.<text:span text:style-name="T3"/></text:p>
            </table:table-cell>
          </table:table-row>
          <table:table-row>
            <table:table-cell table:style-name="Table2.A1" office:value-type="string">
              <text:p text:style-name="P5">Nutritional Stabilization</text:p>
            </table:table-cell>
            <table:table-cell table:style-name="Table2.A1" office:value-type="string">
              <text:p text:style-name="P6">Prevents hypoglycemic crashes from compounding the neurological crash; amino acids are essential for endogenous neurotransmitter synthesis.<text:span text:style-name="T3"/></text:p>
            </table:table-cell>
            <table:table-cell table:style-name="Table2.A1" office:value-type="string">
              <text:p text:style-name="P6">Incorporate a high-protein snack immediately prior to the anticipated onset of the medication wearing off to stabilize blood sugar and improve concentration.<text:span text:style-name="T3"/></text:p>
            </table:table-cell>
          </table:table-row>
          <text:soft-page-break/>
          <table:table-row>
            <table:table-cell table:style-name="Table2.A1" office:value-type="string">
              <text:p text:style-name="P5">Therapeutic Physical Activity</text:p>
            </table:table-cell>
            <table:table-cell table:style-name="Table2.A1" office:value-type="string">
              <text:p text:style-name="P6">Generates a natural, transient elevation of catecholamines to bridge the gap as the artificial stimulants leave the system.<text:span text:style-name="T3"/></text:p>
            </table:table-cell>
            <table:table-cell table:style-name="Table2.A1" office:value-type="string">
              <text:p text:style-name="P6">Schedule a walk around the neighborhood, a game of catch, or non-competitive physical activity directly during the specific hour the medication typically clears.<text:span text:style-name="T3"/></text:p>
            </table:table-cell>
          </table:table-row>
          <table:table-row>
            <table:table-cell table:style-name="Table2.A1" office:value-type="string">
              <text:p text:style-name="P5">Pharmacological Adjustments</text:p>
            </table:table-cell>
            <table:table-cell table:style-name="Table2.A1" office:value-type="string">
              <text:p text:style-name="P6">Alters the pharmacokinetic curve to prevent a precipitous drop, creating a "stepped" descent in blood serum levels.<text:span text:style-name="T3"/></text:p>
            </table:table-cell>
            <table:table-cell table:style-name="Table2.A1" office:value-type="string">
              <text:p text:style-name="P6">Consult with a medical provider to prescribe a small, immediate-release "booster dose" in the late afternoon, or transition entirely to a non-stimulant medication.<text:span text:style-name="T3"/></text:p>
            </table:table-cell>
          </table:table-row>
          <table:table-row>
            <table:table-cell table:style-name="Table2.A1" office:value-type="string">
              <text:p text:style-name="P5">Environmental Soothing</text:p>
            </table:table-cell>
            <table:table-cell table:style-name="Table2.A1" office:value-type="string">
              <text:p text:style-name="P6">Reduces external sensory input to accommodate the sudden drop in the brain's ability to filter and inhibit stimuli.<text:span text:style-name="T3"/></text:p>
            </table:table-cell>
            <table:table-cell table:style-name="Table2.A1" office:value-type="string">
              <text:p text:style-name="P6">Implement a "downtime" protocol upon returning home, utilizing calming activities and avoiding high-stimulus environments like crowded grocery stores.<text:span text:style-name="T3"/></text:p>
            </table:table-cell>
          </table:table-row>
        </table:table>
        <text:p text:style-name="Text_20_body"/>
      </text:section>
      <text:h text:style-name="P2" text:outline-level="2">The Unmedicated Planning Paradigm: Externalization and Behavioral Activation</text:h>
      <text:p text:style-name="P3"><text:bookmark text:name="p-c_93a4b892acd15d1a_dbaeb244-7a8d-4aa8-9378-2a4606980430-41"/><text:span text:style-name="T1">Planning without the aid of medication presents a fundamentally different and significantly more arduous cognitive challenge. Whether due to patient preference, adverse cardiovascular side effects, severe sleep disturbances, pregnancy, or planned "medication holidays" on weekends, a large segment of the ADHD population navigates their lives entirely unmedicated.</text:span> <text:span text:style-name="T1">The unmedicated brain struggles profoundly with "task initiation friction," meaning the biochemical activation energy required to begin a mundane task is pathologically high.</text:span> <text:span text:style-name="T1">Consequently, unmedicated planning frameworks cannot rely on internal willpower; they must aggressively externalize executive functions, relying on physical systems, social pressure, and environmental cues to bypass the underactive prefrontal cortex entirely.</text:span></text:p>
      <text:h text:style-name="P7" text:outline-level="3">Externalizing Working Memory and Visualizing Time</text:h>
      <text:p text:style-name="P3"><text:bookmark text:name="p-c_93a4b892acd15d1a_dbaeb244-7a8d-4aa8-9378-2a4606980430-42"/><text:span text:style-name="T1">The primary directive of unmedicated planning is to externalize working memory. Individuals are clinically advised to "take the load off" their executive functions by outsourcing the management of information to reliable external tools.</text:span> <text:span text:style-name="T1">This involves the intentional, strategic use of sticky notes placed on highly visible surfaces (like bathroom mirrors), physical planners, whiteboards, voice notes, texts to self, smart speakers, location-based reminders, and recurring phone alarms.</text:span> <text:span text:style-name="T1">The objective is to dump all internal information into the physical environment so the individual does not have to internally juggle complex data, which frequently leads to cognitive overload and paralysis.</text:span></text:p>
      <text:p text:style-name="P3"><text:bookmark text:name="p-c_93a4b892acd15d1a_dbaeb244-7a8d-4aa8-9378-2a4606980430-43"/><text:soft-page-break/><text:span text:style-name="T1">Because the unmedicated ADHD brain suffers from severe time blindness, time itself must be made visible and tangible.</text:span> <text:span text:style-name="T1">Traditional, linear to-do lists are often highly ineffective for unmedicated individuals because they present tasks without contextualizing their temporal weight or the sequence of execution.</text:span> <text:span text:style-name="T1">Instead, techniques such as time-blocking and the use of physical countdown timers are critical interventions.</text:span> <text:span text:style-name="T1">By utilizing visual timers—such as the Pomodoro technique, which alternates between focused work blocks and mandated rest periods—abstract time is transformed into a deteriorating visual resource.</text:span> <text:span text:style-name="T1">This artificially manufactures the stress and urgency required to stimulate the brain's wakefulness networks, forcing the initiation of the task.</text:span></text:p>
      <text:p text:style-name="P3"><text:bookmark text:name="p-c_93a4b892acd15d1a_dbaeb244-7a8d-4aa8-9378-2a4606980430-44"/><text:span text:style-name="T1">For adults navigating unmedicated workdays, lowering the barrier to entry is paramount. Tasks must be broken down to their absolute smallest, least intimidating components.</text:span> <text:span text:style-name="T1">Furthermore, utilizing "body doubling"—the act of working alongside another focused individual—provides the necessary social scaffolding and passive accountability to maintain momentum when intrinsic motivation fails.</text:span> <text:span text:style-name="T1">Community support and shared experiences fundamentally reduce the shame and guilt associated with task failure, which in turn reduces the emotional friction of trying again.</text:span></text:p>
      <text:h text:style-name="P7" text:outline-level="3">Cognitive Behavioral Therapy and the CADDI Protocol</text:h>
      <text:p text:style-name="P3"><text:bookmark text:name="p-c_93a4b892acd15d1a_dbaeb244-7a8d-4aa8-9378-2a4606980430-45"/><text:span text:style-name="T1">While generic Cognitive Behavioral Therapy (CBT) has demonstrated efficacy in reducing core ADHD symptoms and improving global functioning when combined with pharmacotherapy, standard protocols often fail to adequately address the specific functional impairments of unmedicated individuals, particularly those with the predominantly inattentive presentation of ADHD (ADHD-I).</text:span> <text:span text:style-name="T1">A 2024 controlled clinical trial of a shortened, six-session CBT format found meaningful improvements in anxiety and depression, and a 7-week CBT-based mobile app program significantly boosted daily functioning, but non-pharmacological interventions require intense, consistent patient effort.</text:span></text:p>
      <text:p text:style-name="P3"><text:bookmark text:name="p-c_93a4b892acd15d1a_dbaeb244-7a8d-4aa8-9378-2a4606980430-46"/><text:span text:style-name="T1">To address the specific needs of the inattentive subtype, researchers have developed CADDI (CBT for ADHD-Inattentive Presentation), a specialized psychological treatment protocol that explicitly integrates behavioral activation into the planning process.</text:span> <text:span text:style-name="T1">Unlike generic CBT or dialectical behavior therapy (DBP), which may heavily focus on regulating physical hyperactivity or impulsivity, CADDI is uniquely tailored to combat the severe procrastination, mental paralysis, and pathologically low activity levels that characterize the unmedicated inattentive brain.</text:span></text:p>
      <text:p text:style-name="P3"><text:bookmark text:name="p-c_93a4b892acd15d1a_dbaeb244-7a8d-4aa8-9378-2a4606980430-47"/><text:span text:style-name="T1">In a pragmatic, two-arm, parallel, randomized controlled trial involving 108 participants across six psychiatric outpatient clinics in Stockholm, researchers compared CADDI to Hesslinger's established dialectical behavior therapy protocol.</text:span> <text:span text:style-name="T1">The results were definitive: between-group analysis demonstrated that participants in the CADDI group experienced significantly greater improvements on the primary outcome measure of behavioral activation at post-assessment (p =.045, d = 0.49).</text:span></text:p>
      <text:p text:style-name="P8">The CADDI protocol revolutionizes unmedicated planning through several distinct mechanisms:</text:p>
      <text:list text:style-name="L1">
        <text:list-item>
          <text:p text:style-name="P9"><text:bookmark text:name="p-c_93a4b892acd15d1a_dbaeb244-7a8d-4aa8-9378-2a4606980430-48"/><text:soft-page-break/><text:span text:style-name="T4">Behavioral Activation:</text:span> It serves as the primary engine for task initiation, aiming to artificially increase engagement in goal-directed behaviors and activity levels despite a total lack of intrinsic motivation.</text:p>
        </text:list-item>
        <text:list-item>
          <text:p text:style-name="P9"><text:bookmark text:name="p-c_93a4b892acd15d1a_dbaeb244-7a8d-4aa8-9378-2a4606980430-49"/><text:span text:style-name="T4">Procrastination Strategies:</text:span> CADDI is the first protocol to explicitly incorporate strategies to combat procrastination, providing compensatory skills to bypass the initiation friction that derails complex projects.</text:p>
        </text:list-item>
        <text:list-item>
          <text:p text:style-name="P9"><text:bookmark text:name="p-c_93a4b892acd15d1a_dbaeb244-7a8d-4aa8-9378-2a4606980430-50"/><text:span text:style-name="T4">Time-Management:</text:span> It provides rigorous techniques to better handle schedules, deadlines, and the organization of goals.</text:p>
        </text:list-item>
        <text:list-item>
          <text:p text:style-name="P9"><text:bookmark text:name="p-c_93a4b892acd15d1a_dbaeb244-7a8d-4aa8-9378-2a4606980430-51"/><text:span text:style-name="T4">Mindfulness Integration:</text:span> It trains the brain to observe attentional drift and distractibility without judgment, allowing the individual to reduce the impact of distractions and return to goal-directed behaviors.</text:p>
        </text:list-item>
      </text:list>
      <text:h text:style-name="P7" text:outline-level="3">Lifestyle, Nutritional, and Somatic Interventions</text:h>
      <text:p text:style-name="P3"><text:bookmark text:name="p-c_93a4b892acd15d1a_dbaeb244-7a8d-4aa8-9378-2a4606980430-52"/><text:span text:style-name="T1">In the absence of pharmacological support, somatic and lifestyle interventions become foundational to the planning framework. Research overwhelmingly supports regular cardiovascular exercise as a potent tool to manage ADHD symptoms.</text:span> <text:span text:style-name="T1">By enhancing brain activity—particularly by inducing adaptive changes in the prefrontal cortex—exercise promotes the optimization of neural activity patterns, significantly improving executive function, reducing impulsivity, and enhancing the ability to mentally plan out tasks.</text:span> <text:span text:style-name="T1">Environmental psychology studies also suggest that substituting indoor activities with "green time" in natural, outdoor settings can materially reduce ADHD symptom severity, indicating that nature acts as a restorative environment for depleted executive resources.</text:span></text:p>
      <text:p text:style-name="P3"><text:bookmark text:name="p-c_93a4b892acd15d1a_dbaeb244-7a8d-4aa8-9378-2a4606980430-53"/><text:span text:style-name="T1">Nutritional strategies also play a supportive, albeit often misunderstood, role in unmedicated management. A comprehensive literature review evaluating non-pharmacological approaches found that a healthy diet consisting of vegetables, fish, and polyunsaturated fatty acids (PUFAs), such as the Mediterranean or DASH diets, is the recommended choice for aiding in ADHD symptom management.</text:span> <text:span text:style-name="T1">These diets provide a stable metabolic foundation, preventing physiological fatigue and hypoglycemic crashes from compounding neurological executive dysfunction. Crucially, however, the literature explicitly notes that isolated supplementation of omega-3s, zinc, and iron without a documented medical deficiency demonstrates no consistent effect on reducing symptoms and is therefore not recommended as a primary intervention.</text:span></text:p>
      <text:h text:style-name="P2" text:outline-level="2">Executive Function Coaching: Bridging the Implementation Gap in Professionals</text:h>
      <text:p text:style-name="P3"><text:bookmark text:name="p-c_93a4b892acd15d1a_dbaeb244-7a8d-4aa8-9378-2a4606980430-54"/><text:span text:style-name="T1">Despite the availability of pharmacological tools and advanced psychotherapeutic protocols, many highly intelligent, capable professionals and adults with ADHD continue to experience profound operational failure as the complexity of their lives increases.</text:span> <text:span text:style-name="T1">This phenomenon occurs because traditional therapy focuses heavily on emotional and psychological processing, and medication provides only the neurochemical capacity for focus; neither inherently teaches a patient </text:span><text:span text:style-name="T2">how</text:span><text:span text:style-name="T1"> to build sustainable organizational systems </text:span><text:soft-page-break/><text:span text:style-name="T1">or structural alignment.</text:span> <text:span text:style-name="T1">To bridge this implementation gap, Executive Function (EF) coaching has emerged as a critical, highly specialized intervention.</text:span></text:p>
      <text:p text:style-name="P3"><text:bookmark text:name="p-c_93a4b892acd15d1a_dbaeb244-7a8d-4aa8-9378-2a4606980430-55"/><text:span text:style-name="T1">Unlike generic life coaching, which relies heavily on motivational interviewing, accountability check-ins, and goal visualization, specialized EF coaching is a highly practical, neurological-based intervention.</text:span> <text:span text:style-name="T1">It acknowledges that the professional's struggle is not a lack of talent, discipline, or commitment, but rather a degradation of their cognitive engine under complex, multi-variable loads.</text:span> <text:span text:style-name="T1">EF coaches operate under the premise that many professionals operate with elite technical skills but lack the structural alignment required to sustain them.</text:span></text:p>
      <text:p text:style-name="P8">The EF coaching process generally follows a highly structured, iterative methodology designed to rebuild the individual's cognitive infrastructure:</text:p>
      <text:list text:style-name="L2">
        <text:list-item>
          <text:p text:style-name="P10"><text:bookmark text:name="p-c_93a4b892acd15d1a_dbaeb244-7a8d-4aa8-9378-2a4606980430-56"/><text:span text:style-name="T4">Discovery and Audit:</text:span> The coach conducts a rigorous diagnostic audit of the client's current cognitive load, identifying precise areas of operational friction, time leaks, and executive performance gaps.</text:p>
        </text:list-item>
        <text:list-item>
          <text:p text:style-name="P10"><text:bookmark text:name="p-c_93a4b892acd15d1a_dbaeb244-7a8d-4aa8-9378-2a4606980430-57"/><text:span text:style-name="T4">Neurological Assessment:</text:span> The process maps the individual's specific neurological strengths and weaknesses against their organizational demands, creating a bespoke cognitive roadmap.</text:p>
        </text:list-item>
        <text:list-item>
          <text:p text:style-name="P10"><text:bookmark text:name="p-c_93a4b892acd15d1a_dbaeb244-7a8d-4aa8-9378-2a4606980430-58"/><text:span text:style-name="T4">System Implementation:</text:span> The coach deploys precise, neuro-inclusive tools and environmental modifications tailored to the client. This includes building custom workflows, clearing digital clutter, managing information overload, and implementing energy-based time management rather than rigid chronological scheduling.</text:p>
        </text:list-item>
        <text:list-item>
          <text:p text:style-name="P10"><text:bookmark text:name="p-c_93a4b892acd15d1a_dbaeb244-7a8d-4aa8-9378-2a4606980430-59"/><text:span text:style-name="T4">Integration and Iteration:</text:span> The final stage focuses on embedding sustainable habits, reviewing failures without moral judgment, and adjusting the systems iteratively until they offer long-term cognitive endurance and stability under complexity.</text:p>
        </text:list-item>
      </text:list>
      <text:p text:style-name="P3"><text:bookmark text:name="p-c_93a4b892acd15d1a_dbaeb244-7a8d-4aa8-9378-2a4606980430-60"/><text:span text:style-name="T1">The landscape of EF coaching is highly variable regarding cost, practitioner expertise, and methodological approach. Because the coaching industry remains largely unregulated, patients must exercise extreme discernment when selecting a provider, as the space is heavily saturated with practitioners utilizing fixed, off-the-shelf curricula that fail to account for neurobiological nuance.</text:span> <text:span text:style-name="T1">True EF specialists often possess advanced degrees in special education or psychology, or have completed rigorous, accredited certification programs.</text:span></text:p>
      <text:section text:style-name="Sect1" text:name="p-c_93a4b892acd15d1a_dbaeb244-7a8d-4aa8-9378-2a4606980430-61">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4"><text:span text:style-name="Strong_20_Emphasis"><text:span text:style-name="T1">Coaching Provider Tier</text:span></text:span></text:p>
              </table:table-cell>
              <table:table-cell table:style-name="Table3.A1" office:value-type="string">
                <text:p text:style-name="P4"><text:span text:style-name="Strong_20_Emphasis"><text:span text:style-name="T1">Focus Area &amp; Clinical Expertise</text:span></text:span></text:p>
              </table:table-cell>
              <table:table-cell table:style-name="Table3.A1" office:value-type="string">
                <text:p text:style-name="P4"><text:span text:style-name="Strong_20_Emphasis"><text:span text:style-name="T1">Estimated Cost Structure</text:span></text:span></text:p>
              </table:table-cell>
              <table:table-cell table:style-name="Table3.A1" office:value-type="string">
                <text:p text:style-name="P4"><text:span text:style-name="Strong_20_Emphasis"><text:span text:style-name="T1">Certification Examples</text:span></text:span></text:p>
              </table:table-cell>
            </table:table-row>
          </table:table-header-rows>
          <table:table-row>
            <table:table-cell table:style-name="Table3.A1" office:value-type="string">
              <text:p text:style-name="P5">General Life Coach</text:p>
            </table:table-cell>
            <table:table-cell table:style-name="Table3.A1" office:value-type="string">
              <text:p text:style-name="P6">General accountability and motivation. Often lacks specific training in neurodivergence or the neurobiology of executive function deficits.<text:span text:style-name="T3"/></text:p>
            </table:table-cell>
            <table:table-cell table:style-name="Table3.A1" office:value-type="string">
              <text:p text:style-name="P6">$75 – $150 per session.<text:span text:style-name="T3"/></text:p>
            </table:table-cell>
            <table:table-cell table:style-name="Table3.A1" office:value-type="string">
              <text:p text:style-name="P6">Non-specialized life coaching certificates.</text:p>
            </table:table-cell>
          </table:table-row>
          <table:table-row>
            <table:table-cell table:style-name="Table3.A1" office:value-type="string">
              <text:p text:style-name="P5">Certified ADHD Coach</text:p>
            </table:table-cell>
            <table:table-cell table:style-name="Table3.A1" office:value-type="string">
              <text:p text:style-name="P6">Focuses on understanding how ADHD impacts daily life <text:soft-page-break/>and relationships. Utilizes standard ADHD management techniques.<text:span text:style-name="T3"/></text:p>
            </table:table-cell>
            <table:table-cell table:style-name="Table3.A1" office:value-type="string">
              <text:p text:style-name="P6">$150 – $250+ per session; average <text:soft-page-break/>$300-$600 per month.<text:span text:style-name="T3"/></text:p>
            </table:table-cell>
            <table:table-cell table:style-name="Table3.A1" office:value-type="string">
              <text:p text:style-name="P6">ICF ACC or PCC (requires 10-750 hours of <text:soft-page-break/>coaching).<text:span text:style-name="T3"/></text:p>
            </table:table-cell>
          </table:table-row>
          <table:table-row>
            <table:table-cell table:style-name="Table3.A1" office:value-type="string">
              <text:p text:style-name="P5">Specialized EF Coach</text:p>
            </table:table-cell>
            <table:table-cell table:style-name="Table3.A1" office:value-type="string">
              <text:p text:style-name="P6">Focuses on advanced skill-building, structural redesign, working memory compensation, and neuro-inclusive workflow consulting.<text:span text:style-name="T3"/></text:p>
            </table:table-cell>
            <table:table-cell table:style-name="Table3.A1" office:value-type="string">
              <text:p text:style-name="P6">$200 – $350+ per session; advisory-level private packages vary widely.<text:span text:style-name="T3"/></text:p>
            </table:table-cell>
            <table:table-cell table:style-name="Table3.A1" office:value-type="string">
              <text:p text:style-name="P6">Executive Function Coaching Academy ($3,500), JST Coaching ($8,499), Connections in Mind.<text:span text:style-name="T3"/></text:p>
            </table:table-cell>
          </table:table-row>
        </table:table>
        <text:p text:style-name="Text_20_body"/>
      </text:section>
      <text:p text:style-name="P11"><text:bookmark text:name="p-c_93a4b892acd15d1a_dbaeb244-7a8d-4aa8-9378-2a4606980430-62"/>While EF coaching is rarely covered by standard medical insurance unless specifically prescribed as a medical necessity by a referring physician, it is increasingly viewed as an indispensable, high-ROI complement to medication, particularly for adults navigating complex corporate, entrepreneurial, or academic environments.</text:p>
      <text:h text:style-name="P2" text:outline-level="2">Institutional Models, Forensic Contexts, and Specialized Clinical Pathways</text:h>
      <text:p text:style-name="P8">As the prevalence and recognition of adult ADHD continue to rise, global healthcare systems, research institutions, and patient advocacy groups are developing sophisticated clinical models to standardize care, aggregate evidence, and provide scalable support across diverse populations.</text:p>
      <text:h text:style-name="P7" text:outline-level="3">The Dutch Model of Specialized Care: PsyQ and ADHDcentraal</text:h>
      <text:p text:style-name="P11"><text:bookmark text:name="p-c_93a4b892acd15d1a_dbaeb244-7a8d-4aa8-9378-2a4606980430-63"/>The Netherlands has emerged as a global leader in providing specialized, lifespan-oriented ADHD clinical care, serving as a blueprint for institutional planning support. Institutions such as PsyQ and ADHDcentraal offer highly streamlined, multidisciplinary care pathways explicitly designed for adults.</text:p>
      <text:p text:style-name="P3"><text:bookmark text:name="p-c_93a4b892acd15d1a_dbaeb244-7a8d-4aa8-9378-2a4606980430-64"/><text:span text:style-name="T1">ADHDcentraal utilizes a highly efficient rapid-diagnostic model designed to move patients "from chaos to focus." The process combines thorough psychiatric examinations with objective continuous performance tests, specifically the QbTest, completing the diagnostic phase within a single day.</text:span> <text:span text:style-name="T1">This is immediately followed by a collaborative treatment plan involving a combination of pharmacological titration and individual counseling.</text:span></text:p>
      <text:p text:style-name="P3"><text:bookmark text:name="p-c_93a4b892acd15d1a_dbaeb244-7a8d-4aa8-9378-2a4606980430-65"/><text:span text:style-name="T1">PsyQ, recognized with the prestigious TOPGGz quality mark for highly specialized care, addresses highly complex ADHD cases, particularly those where ADHD is accompanied by severe psychiatric comorbidities such as trauma, severe depression, personality disorders, or active addiction.</text:span> <text:span text:style-name="T1">Utilizing the Diagnostisch Interview voor ADHD (DIVA-5), a hallmark of the PsyQ methodology is their strict clinical protocol: they prioritize treating severe secondary complaints (e.g., active substance abuse, severe sleep problems) before initiating ADHD-specific treatment.</text:span> <text:span text:style-name="T1">The rationale is that an unstable psychiatric baseline renders executive function interventions and stimulant medications both dangerous and largely ineffective.</text:span></text:p>
      <text:p text:style-name="P3"><text:bookmark text:name="p-c_93a4b892acd15d1a_dbaeb244-7a8d-4aa8-9378-2a4606980430-66"/><text:soft-page-break/><text:span text:style-name="T1">Furthermore, PsyQ heavily integrates digital health technology into the daily planning and execution of its patients. The "Superbrains" app acts as a central digital hub for the patient's treatment trajectory.</text:span> <text:span text:style-name="T1">It facilitates dynamic goal setting, provides the patient with a transparent overview of their treatment plan, and establishes a rapid communication channel with practitioners via chat or video calls.</text:span> <text:span text:style-name="T1">Crucially, the app incorporates a "buddy system," allowing patients to invite a partner, parent, or trusted friend into the app to monitor their progress.</text:span> <text:span text:style-name="T1">This effectively crowdsources the executive function of accountability, providing the externalized social scaffolding required by the unmedicated or struggling ADHD brain.</text:span></text:p>
      <text:p text:style-name="P3"><text:bookmark text:name="p-c_93a4b892acd15d1a_dbaeb244-7a8d-4aa8-9378-2a4606980430-67"/><text:span text:style-name="T1">Patient advocacy also plays a vital role in the Dutch system. The association "Impuls &amp; Woortblind," representing individuals with neurodivergent brains (ADHD, ADD, dyslexia, dyscalculia), actively collaborates with pharmacovigilance centers like Lareb to monitor medication impacts.</text:span> <text:span text:style-name="T1">A collaborative survey revealed that 75% of adults using medication for ADHD experience side effects, underscoring the critical need for national Adverse Drug Reaction (ADR) reporting systems to inform better clinical planning and titration strategies.</text:span></text:p>
      <text:h text:style-name="P7" text:outline-level="3">Evidence-Based Standardization: The EBI-ADHD Platform</text:h>
      <text:p text:style-name="P3"><text:bookmark text:name="p-c_93a4b892acd15d1a_dbaeb244-7a8d-4aa8-9378-2a4606980430-68"/><text:span text:style-name="T1">A major historical hurdle in ADHD planning and treatment has been the sheer volume of disparate, often conflicting scientific literature regarding intervention efficacy. To rectify this, researchers launched the EBI-ADHD (Evidence-Based Interventions for ADHD) platform in 2025.</text:span> <text:span text:style-name="T1">Built upon a formal umbrella review published in </text:span><text:span text:style-name="T2">The BMJ</text:span><text:span text:style-name="T1">, the platform analyzed over 221 meta-analyses utilizing a standardized statistical pipeline.</text:span></text:p>
      <text:p text:style-name="P3"><text:bookmark text:name="p-c_93a4b892acd15d1a_dbaeb244-7a8d-4aa8-9378-2a4606980430-69"/><text:span text:style-name="T1">EBI-ADHD is powered by a database covering over 50,000 participants and more than 30 different pharmacological, psychological, and lifestyle interventions.</text:span> <text:span text:style-name="T1">It provides clinicians and patients with an interactive dashboard and evidence matrix, allowing users to filter by age group and timeframe (12, 26, or 52 weeks).</text:span> <text:span text:style-name="T1">The matrix instantly displays both the effect size of an intervention and the clinical certainty of that result (ranging from high to very low), effectively eliminating the guesswork and trial-and-error approach to creating a comprehensive ADHD treatment plan.</text:span> <text:span text:style-name="T1">Interestingly, the </text:span><text:span text:style-name="T2">BMJ</text:span><text:span text:style-name="T1"> review highlighted that while short-term benefits of medications are clear, there is currently no moderate or high certainty evidence for the sustained, long-term benefits of either drug or non-drug interventions across age groups, reinforcing the need for continuous, lifelong executive function support.</text:span></text:p>
      <text:h text:style-name="P7" text:outline-level="3">Executive Functioning in Forensic and Judicial Contexts</text:h>
      <text:p text:style-name="P3"><text:bookmark text:name="p-c_93a4b892acd15d1a_dbaeb244-7a8d-4aa8-9378-2a4606980430-70"/><text:span text:style-name="T1">The failure to recognize and accommodate executive function deficits has severe consequences in specialized environments, particularly within Juvenile Justice Institutions (JJI). Qualitative research involving psychologists and remedial educationalists working in JJI contexts reveals a systemic failure to integrate EF explicitly into intervention decision-making.</text:span> <text:span text:style-name="T1">Justice-involved youth with ADHD frequently experience severe cognitive overload during rehabilitative interventions, such as cognitive behavioral therapy or schema therapy.</text:span></text:p>
      <text:p text:style-name="P3"><text:bookmark text:name="p-c_93a4b892acd15d1a_dbaeb244-7a8d-4aa8-9378-2a4606980430-71"/><text:span text:style-name="T1">Because executive functioning is rarely made explicit in the daily practice or pedagogical climate of these institutions, staff frequently misinterpret this neurobiological cognitive overload as oppositional behavior or a lack of motivation.</text:span> <text:span text:style-name="T1">To adapt interventions to the </text:span><text:soft-page-break/><text:span text:style-name="T1">cognitive level of the youth, clinicians must make significant structural adjustments: repeating exercises more often, drastically shortening therapy sessions, utilizing highly visual aids, simplifying language, and modifying homework assignments.</text:span> <text:span text:style-name="T1">Recognizing EF deficits in this population is critical; attributing planning failures to a lack of motivation rather than neurological inability severely undermines the efficacy of forensic rehabilitation.</text:span></text:p>
      <text:h text:style-name="P2" text:outline-level="2">Psychosocial Variables: Self-Esteem, Masking, and the Transition to Adulthood</text:h>
      <text:p text:style-name="P3"><text:bookmark text:name="p-c_93a4b892acd15d1a_dbaeb244-7a8d-4aa8-9378-2a4606980430-72"/><text:span text:style-name="T1">A comprehensive, lifespan-oriented planning framework must account for the psychological damage inflicted by decades of chronic executive dysfunction. As individuals transition from childhood into emerging adulthood (ages 16-25), the nature of ADHD care must fundamentally shift.</text:span> <text:span text:style-name="T1">In childhood, care typically focuses on behavioral problems, and interventions center on parent training—teaching the caregivers how to provide structure.</text:span> <text:span text:style-name="T1">During adolescence, treatment pivots to the individual, focusing on basic planning skills and medication management.</text:span> <text:span text:style-name="T1">However, in young adulthood, the complexity of life increases exponentially with study choices, career initiation, financial independence, and complex social relationships.</text:span></text:p>
      <text:p text:style-name="P3"><text:bookmark text:name="p-c_93a4b892acd15d1a_dbaeb244-7a8d-4aa8-9378-2a4606980430-73"/><text:span text:style-name="T1">Young adults with ADHD carry a heavy psychological burden: a history of "stumbling moments," chronic academic failures, missed deadlines, social misunderstandings, and negative feedback.</text:span> <text:span text:style-name="T1">This history culminates in severely eroded self-esteem and pervasive psychological distress.</text:span> <text:span text:style-name="T1">Low self-esteem creates a highly destructive negative feedback loop: the persistent fear of failure leads to anxiety and intense "masking" (the exhausting, conscious effort to hide neurodivergent traits to appear neurotypical).</text:span> <text:span text:style-name="T1">Masking requires immense cognitive resources, which further depletes the limited prefrontal bandwidth required for effective executive functioning and daily planning.</text:span></text:p>
      <text:p text:style-name="P3"><text:bookmark text:name="p-c_93a4b892acd15d1a_dbaeb244-7a8d-4aa8-9378-2a4606980430-74"/><text:span text:style-name="T1">To combat this psychological deterioration, research initiatives like the "ADHD&amp;me" (ADHD&amp;ik) project at Leiden University are pioneering cognitive-behavioral therapeutic interventions specifically targeted at the psychosocial realities of emerging adults.</text:span> <text:span text:style-name="T1">The intervention recognizes that standard skills training is insufficient if the individual's self-concept is fundamentally broken.</text:span> <text:span text:style-name="T1">Utilizing a multicenter randomized controlled trial with stratified block randomization (accounting for medication use, gender, and age), the ADHD&amp;me protocol consists of seven individual therapy sessions.</text:span></text:p>
      <text:p text:style-name="P3"><text:bookmark text:name="p-c_93a4b892acd15d1a_dbaeb244-7a8d-4aa8-9378-2a4606980430-75"/><text:span text:style-name="T1">The core objectives of the intervention are to dismantle negative self-evaluations, reduce pathological masking behaviors, help participants recognize their inherent strengths, and forge an adaptive, realistic relationship with their neurodivergence.</text:span> <text:span text:style-name="T1">By systematically repairing self-esteem and reducing the cognitive load required for masking, the intervention lowers the profound affective friction associated with task initiation, rendering practical planning tools and EF coaching significantly more effective.</text:span></text:p>
      <text:p text:style-name="P3"><text:bookmark text:name="p-c_93a4b892acd15d1a_dbaeb244-7a8d-4aa8-9378-2a4606980430-76"/><text:span text:style-name="T1">Furthermore, the assessment of cognitive processes in these populations reveals subtle but vital differences based on medication status. Studies utilizing the WISC-IV and the Cambridge Neuropsychological Test Automated Battery (CANTAB) indicate that unmedicated children with ADHD experience small subtest score differences, demonstrating that demands for executive control, speed, accuracy, and precision heavily </text:span><text:soft-page-break/><text:span text:style-name="T1">tax the unmedicated brain.</text:span> <text:span text:style-name="T1">Any planning framework designed for this demographic must therefore limit the demand for rapid, high-precision cognitive switching unless pharmacological support is active.</text:span></text:p>
      <text:h text:style-name="P2" text:outline-level="2">Conclusions and Clinical Implications for ADHD Planning</text:h>
      <text:p text:style-name="P8">The architecture of an effective, sustainable planning framework for an individual with Attention-Deficit/Hyperactivity Disorder cannot be monolithic. It must be highly dynamic, deeply personalized, and rigorously responsive to the individual's precise pharmacological status, developmental stage, and specific neurobiological deficits. Synthesizing the latest clinical, neuroimaging, and psychological research yields several critical imperatives for patients, clinicians, and executive function coaches:</text:p>
      <text:p text:style-name="P3"><text:bookmark text:name="p-c_93a4b892acd15d1a_dbaeb244-7a8d-4aa8-9378-2a4606980430-77"/><text:span text:style-name="T1">First, the clinical management of adult ADHD must unequivocally transition away from the simple reduction of subjective behavioral symptoms toward the objective measurement of functional output and task completion.Physicians and coaches must evaluate the efficacy of their interventions based on whether the individual can successfully close the gap between intention and execution, utilizing environmental modifications and "social scaffolding" to bypass inherent working memory deficits.</text:span></text:p>
      <text:p text:style-name="P3"><text:bookmark text:name="p-c_93a4b892acd15d1a_dbaeb244-7a8d-4aa8-9378-2a4606980430-78"/><text:span text:style-name="T1">Second, the neurobiological revelation that stimulant medications primarily activate the brain's wakefulness and reward centers, rather than dedicated attention circuitry, redefines the strategic scheduling of the medicated patient.</text:span> <text:span text:style-name="T1">Medicated planning must intentionally capitalize on the artificial reward salience provided by the drug to tackle the most complex, high-friction tasks during peak plasma concentrations, while strictly, preemptively managing the neurochemical drop-off during the volatile rebound phase through chronobiological scheduling and nutritional support.</text:span></text:p>
      <text:p text:style-name="P3"><text:bookmark text:name="p-c_93a4b892acd15d1a_dbaeb244-7a8d-4aa8-9378-2a4606980430-79"/><text:span text:style-name="T1">Third, for unmedicated individuals, or during inevitable unmedicated windows, planning systems that rely on internal discipline, willpower, or delayed gratification are clinically contraindicated and destined to fail.</text:span> <text:span text:style-name="T1">Success in the unmedicated state requires the aggressive, unapologetic externalization of time and working memory through visual chronometric devices, specialized psychotherapeutic protocols like CADDI that force behavioral activation, and lifestyle modifications that artificially simulate the physiological urgency and reward the brain cannot produce organically.</text:span></text:p>
      <text:p text:style-name="P3"><text:bookmark text:name="p-c_93a4b892acd15d1a_dbaeb244-7a8d-4aa8-9378-2a4606980430-80"/><text:span text:style-name="T1">Finally, the future of comprehensive ADHD management lies in the seamless synthesis of medical intervention and structural, psychosocial support. Advanced diagnostic tools like the QbTest, exhaustive evidence-based data aggregators like EBI-ADHD, targeted self-esteem interventions like ADHD&amp;me, and highly specialized executive function coaching provide the necessary bridge between a neurochemically capable brain and a functionally successful life.</text:span> <text:span text:style-name="T1">By recognizing ADHD not merely as a superficial deficit of attention, but as a profound, systemic disorder of intention, reward processing, temporal perception, and cognitive infrastructure, professionals and patients can collaboratively design robust, neuro-inclusive systems that enable individuals to achieve stability, endurance, and success in the face of escalating real-world complexity.</text:spa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4T13:40:41.596987000</meta:creation-date>
    <dc:date>2026-04-14T13:41:20.041561000</dc:date>
    <meta:editing-duration>PT39S</meta:editing-duration>
    <meta:editing-cycles>1</meta:editing-cycles>
    <meta:document-statistic meta:table-count="3" meta:image-count="0" meta:object-count="0" meta:page-count="14" meta:paragraph-count="133" meta:word-count="5617" meta:character-count="43293" meta:non-whitespace-character-count="37828"/>
    <meta:generator>LibreOffice/26.2.2.2$MacOSX_X86_64 LibreOffice_project/1f77d10d6938fd34972958f64b2bcfa54f8b1ba5</meta:generator>
  </office:meta>
</office:document-meta>
</file>